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ervo.h&gt;<text:line-break/>#include &lt;Wire.h&gt;<text:line-break/>#include &lt;rgb_lcd.h&gt;<text:line-break/>#include &lt;Ultrasonic.h&gt;<text:line-break/><text:line-break/>#define PIN_SERVO_3 <text:s/>3<text:line-break/>#define PIN_SIMPLE_BUTTON_4 <text:s/>4<text:line-break/>#define PIN_ULTRASONIC_8 <text:s/>8<text:line-break/>#define PIN_ULTRASONIC_7 <text:s/>7<text:line-break/><text:line-break/>Servo servomotor_3;<text:line-break/>rgb_lcd lcdRgb;<text:line-break/>Ultrasonic ultrasonic_8(PIN_ULTRASONIC_8);<text:line-break/>Ultrasonic ultrasonic_7(PIN_ULTRASONIC_7);<text:line-break/><text:line-break/>int liste;<text:line-break/><text:line-break/>void setup() {<text:line-break/> <text:s/>servomotor_3.attach(PIN_SERVO_3);<text:line-break/> <text:s/>lcdRgb.begin(16, 2);<text:line-break/> <text:s/>pinMode(PIN_SIMPLE_BUTTON_4, INPUT);<text:line-break/> <text:s/>pinMode(PIN_ULTRASONIC_8, INPUT);<text:line-break/> <text:s/>pinMode(PIN_ULTRASONIC_7, INPUT);<text:line-break/> <text:s/>servomotor_3.write(20);<text:line-break/> <text:s/>lcdRgb.setCursor(2, 0);<text:line-break/> <text:s/>lcdRgb.print(String("PLACE LIBRE"));<text:line-break/>}<text:line-break/><text:line-break/>void loop() {<text:line-break/> <text:s/>lcdRgb.setCursor(2, 0);<text:line-break/> <text:s/>lcdRgb.print(String("PLACE LIBRE"));<text:line-break/> <text:s/>lcdRgb.setCursor(6, 1);<text:line-break/> <text:s/>lcdRgb.print(String(liste));<text:line-break/> <text:s/>liste = 200;<text:line-break/> <text:s/>if (digitalRead(PIN_SIMPLE_BUTTON_4)) {<text:line-break/> <text:s text:c="3"/>servomotor_3.write(90);<text:line-break/> <text:s text:c="3"/>delay(1000*10);<text:line-break/> <text:s text:c="3"/>servomotor_3.write(20);<text:line-break/> <text:s/>} else {<text:line-break/> <text:s text:c="3"/>servomotor_3.write(20);<text:line-break/> <text:s/>}<text:line-break/> <text:s/>if (ultrasonic_8.MeasureInCentimeters() &lt; 10) {<text:line-break/> <text:s text:c="3"/>liste = liste - 1;<text:line-break/> <text:s/>}<text:line-break/> <text:s/>if (ultrasonic_7.MeasureInCentimeters() &lt; 10) {<text:line-break/> <text:s text:c="3"/>liste = liste - 1;<text:line-break/> <text:s/>}<text:line-break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9T11:03:52.872000000</meta:creation-date>
    <dc:date>2026-05-19T11:04:40.922000000</dc:date>
    <meta:editing-duration>PT50S</meta:editing-duration>
    <meta:editing-cycles>1</meta:editing-cycles>
    <meta:document-statistic meta:table-count="0" meta:image-count="0" meta:object-count="0" meta:page-count="1" meta:paragraph-count="1" meta:word-count="95" meta:character-count="1075" meta:non-whitespace-character-count="908"/>
    <meta:generator>LibreOffice/7.6.0.3$Windows_X86_64 LibreOffice_project/69edd8b8ebc41d00b4de3915dc82f8f0fc3b6265</meta:generator>
  </office:meta>
</office:document-meta>
</file>